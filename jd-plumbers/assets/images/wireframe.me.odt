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style:font-name="Calibri" fo:font-size="16pt" fo:language="en" fo:country="US" officeooo:paragraph-rsid="00160eb3" style:font-size-asian="16pt" style:font-size-complex="16pt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style:font-name="Calibri" fo:font-size="16pt" fo:language="en" fo:country="GB" officeooo:rsid="002a203e" officeooo:paragraph-rsid="00160eb3" style:font-size-asian="16pt" style:font-size-complex="16pt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style:font-name="Calibri" fo:font-size="16pt" fo:language="en" fo:country="US" officeooo:rsid="00289500" officeooo:paragraph-rsid="00160eb3" style:font-size-asian="16pt" style:font-size-complex="16pt"/>
    </style:style>
    <style:style style:name="T1" style:family="text">
      <style:text-properties officeooo:rsid="0025e0b1"/>
    </style:style>
    <style:style style:name="T2" style:family="text">
      <style:text-properties officeooo:rsid="00160eb3"/>
    </style:style>
    <style:style style:name="T3" style:family="text">
      <style:text-properties officeooo:rsid="0028950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6e6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JD Plumbers - Professional Plumbing Services Website<text:line-break/><text:line-break/>This is a responsive, multi-page website designed for 'JD Plumbers', a local plumbing business. The project provides a modern web presence allowing users to browse plumbing services, view transparent pricing tiers, and contact the business for emergency repairs.<text:line-break/><text:line-break/>👉 **[Click Here to View the Live Website](https://<text:span text:style-name="T1">jaibe-444</text:span>.github.io/<text:span text:style-name="T1">jd-plumbers</text:span>/)**<text:line-break/><text:line-break/>---<text:line-break/><text:line-break/>## 🎯 Project Goals &amp; Target Audience<text:line-break/>* **Business Goals:** Establish an online presence, showcase expertise, and generate leads by making it incredibly easy for customers to request quotes.<text:line-break/>* **User Goals:** Quickly find a reliable plumber, view service availability, and access emergency contact details during a household crisis.<text:line-break/>* **Target Audience:** Homeowners, landlords, and local commercial property managers in need of fast, trustworthy plumbing solutions.<text:line-break/><text:line-break/>---<text:line-break/><text:line-break/>## 🎨 User Experience (UX) &amp; Design<text:line-break/><text:line-break/>### User Stories<text:line-break/>* **As a first-time visitor**, I want to instantly see if this business handles my specific issue (e.g., burst pipes, boiler repair).<text:line-break/>* **As an emergency customer**, I want to find a phone number immediately upon landing on the homepage.<text:line-break/>* **As a busy homeowner**, I want a clear online contact form so I can request a booking without calling.<text:line-break/><text:soft-page-break/><text:line-break/>### Wireframes &amp; Visual Design<text:line-break/><text:line-break/>* **Typography:** * **Headers:** 'Montserrat', sans-serif – Chosen for its bold, modern, and highly professional geometric look to make headings stand out.<text:line-break/> <text:s/>* **Body Text:** 'Roboto', sans-serif – Utilized for clean, neutral readability across all service descriptions, ensuring a comfortable reading experience on mobile and desktop alike.</text:p>
      <text:p text:style-name="P2">👉 **[Click Here to View the Complete 3-Page Wireframe Blueprint Document](jd-plumbers/assets/images/wireframe-jd-plumbers.<text:span text:style-name="T2">odt</text:span>)** </text:p>
      <text:p text:style-name="P1"><text:line-break/><text:line-break/>* **Color Palette:**<text:line-break/> <text:s/>* **Primary Color (Deep Navy Blue - `#1B365D`):** Represents trust, reliability, and corporate professionalism—essential traits for a dependable emergency service business.<text:line-break/> <text:s/>* **Secondary/Accent Color (Water Cyan - `#00A3E0`):** Provides a bright, thematic contrast that immediately aligns with water, plumbing, and modern utility branding.<text:line-break/> <text:s/>* **Neutral Backgrounds (Crisp White - `#FFFFFF` &amp; Light Gray - `#F8F9FA`):** Used to maintain high readability, clean layouts, and an uncluttered visual hierarchy.<text:line-break/><text:line-break/>---<text:line-break/><text:line-break/>## ⚡ Features Implemented<text:line-break/><text:line-break/>* **Multi-Page Architecture:** Clean navigation across Home (`index.html`), Services (`services.html`), and Contact (`contact.html`) pages.<text:line-break/><text:soft-page-break/>* **Fully Responsive Layout:** Optimized using custom CSS and media queries to look flawless on smartphones, tablets, and desktop monitors.<text:line-break/>* **Interactive Contact Form:** A fully validated user form with input checks for names, email formatting, and message constraints.<text:line-break/>* **Custom Assets:** Custom themed iconography and an embedded favicon matching the corporate branding displayed in the browser tab.<text:line-break/><text:line-break/>---<text:line-break/><text:line-break/>## 🛠️ Technologies Used<text:line-break/>* **HTML5** - For semantic document structure (`&lt;header&gt;`, `&lt;nav&gt;`, `&lt;main&gt;`, `&lt;section&gt;`, `&lt;footer&gt;`).<text:line-break/>* **CSS3** - For custom layouts, typography styling, and responsive media breakpoint design.<text:line-break/>* **Git &amp; GitHub** - For version control management and deployment tracking.<text:line-break/>* **GitHub Pages** - For hosting the live public-facing deployment.</text:p>
      <text:p text:style-name="P1"><text:span text:style-name="T3">* **W3 Schools** For references and code snippets.</text:span></text:p>
      <text:p text:style-name="P1"><text:span text:style-name="T3">* **Replit.com**For writing and testing out code.</text:span><text:line-break/><text:line-break/>---<text:line-break/><text:line-break/>## 🚀 Deployment &amp; Local Setup<text:line-break/><text:line-break/>### Live Deployment<text:line-break/>This project was deployed directly via GitHub Pages following these steps:<text:line-break/>1. Files were organized ensuring `index.html` sits at the absolute root level.<text:line-break/>2. The GitHub Repository settings were configured to build from the `main` branch.<text:line-break/><text:soft-page-break/>3. The site updates automatically whenever changes are committed to the remote repository.</text:p>
      <text:p text:style-name="P3">## Testing</text:p>
      <text:p text:style-name="P3"><text:span text:style-name="T4">Lighthouse</text:span> – google chrome extension for speed test.</text:p>
      <text:p text:style-name="P1"><text:span text:style-name="T3">Score = 95%</text:span><text:line-break/><text:line-break/>### Local Execution<text:line-break/>To run this project locally on your machine:<text:line-break/>1. Clone the repository: `git clone https://github.com/<text:span text:style-name="T1">jaibe-444</text:span>/<text:span text:style-name="T1">jd-plumbers</text:span>.git`<text:line-break/>2. Open the project folder in your preferred text editor (e.g., Visual Studio Code).<text:line-break/>3. Open `index.html` directly in any web browser.<text:line-break/><text:line-break/>---<text:line-break/><text:line-break/>## 📝 Credits &amp; Acknowledgments<text:line-break/>* **Images:** All placeholder imagery sourced via high-quality royalty-free providers like [Unsplash / Pexels / Pixabay].<text:line-break/>* **Icons:** Visual icon vectors provided by [FontAwesome / Flaticon].<text:line-break/>* **Educational Context:** Created as part of Milestone Project 1 for [<text:span text:style-name="T5">Web application development</text:span>/ <text:span text:style-name="T1">Code </text:span>Institute]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a" fo:country="DK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01T02:38:14.665557800</meta:creation-date>
    <dc:date>2026-07-01T02:43:39.583654300</dc:date>
    <meta:editing-duration>PT5M26S</meta:editing-duration>
    <meta:editing-cycles>1</meta:editing-cycles>
    <meta:document-statistic meta:table-count="0" meta:image-count="0" meta:object-count="0" meta:page-count="4" meta:paragraph-count="8" meta:word-count="627" meta:character-count="4453" meta:non-whitespace-character-count="3801"/>
    <meta:generator>LibreOffice/25.8.6.2$Windows_X86_64 LibreOffice_project/b4b39682cd9868fa725bc664aff94278d315bd04</meta:generator>
  </office:meta>
</office:document-meta>
</file>