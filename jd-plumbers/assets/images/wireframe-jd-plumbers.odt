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000000022F4756EC9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bed0" officeooo:paragraph-rsid="0016be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12.963cm" draw:z-index="0"><draw:image xlink:href="Pictures/10000001000004000000022F4756EC99.png" xlink:type="simple" xlink:show="embed" xlink:actuate="onLoad" draw:mime-type="image/png"/></draw:frame>Wireframe-jd-plumbers</text:p>
      <text:p text:style-name="P1">desktop, tablet and mobile vers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1T01:38:56.716237800</meta:creation-date>
    <dc:date>2026-07-01T01:44:28.159146400</dc:date>
    <meta:editing-duration>PT5M33S</meta:editing-duration>
    <meta:editing-cycles>1</meta:editing-cycles>
    <meta:document-statistic meta:table-count="0" meta:image-count="1" meta:object-count="0" meta:page-count="1" meta:paragraph-count="2" meta:word-count="6" meta:character-count="57" meta:non-whitespace-character-count="53"/>
    <meta:generator>LibreOffice/25.8.6.2$Windows_X86_64 LibreOffice_project/b4b39682cd9868fa725bc664aff94278d315bd04</meta:generator>
  </office:meta>
</office:document-meta>
</file>